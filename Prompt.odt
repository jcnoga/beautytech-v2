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top="0cm" fo:margin-bottom="0.247cm" style:contextual-spacing="false" fo:line-height="115%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>
      <style:text-properties officeooo:rsid="001f1291" officeooo:paragraph-rsid="001f21f7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Desenvolva um aplicativo desktop para Windows com a finalidade de realizar prospecção comercial via WhatsApp de forma semiautomática.</text:p>
      <text:h text:style-name="P1" text:outline-level="3">Funcionalidades Principais</text:h>
      <text:list text:style-name="L1">
        <text:list-item>
          <text:p text:style-name="P2">Permitir ao usuário selecionar e carregar um arquivo XLSX (Excel) através de uma interface simples e intuitiva.</text:p>
        </text:list-item>
        <text:list-item>
          <text:p text:style-name="P2">O sistema deverá interpretar automaticamente a planilha, contendo no mínimo as colunas:</text:p>
          <text:list>
            <text:list-item>
              <text:p text:style-name="P2">Nome</text:p>
            </text:list-item>
            <text:list-item>
              <text:p text:style-name="P2">Telefone</text:p>
            </text:list-item>
          </text:list>
        </text:list-item>
        <text:list-item>
          <text:p text:style-name="P2">Para cada registro da planilha:</text:p>
          <text:list>
            <text:list-item>
              <text:p text:style-name="P2">Substituir automaticamente o texto "[Nome]" pelo nome do cliente.</text:p>
            </text:list-item>
            <text:list-item>
              <text:p text:style-name="P2">Gerar a mensagem personalizada.</text:p>
            </text:list-item>
            <text:list-item>
              <text:p text:style-name="P2">Abrir o WhatsApp Web ou WhatsApp Desktop já com a conversa e a mensagem preenchida.</text:p>
            </text:list-item>
          </text:list>
        </text:list-item>
        <text:list-item>
          <text:p text:style-name="P2">Validação de números:</text:p>
          <text:list>
            <text:list-item>
              <text:p text:style-name="P2">Caso o número esteja inválido, incompleto ou apresente erro ao abrir a conversa no WhatsApp, o sistema deverá ignorar o contato automaticamente e avançar para o próximo registro.</text:p>
            </text:list-item>
            <text:list-item>
              <text:p text:style-name="P2">Registrar os números com erro em um relatório de falhas.</text:p>
            </text:list-item>
          </text:list>
        </text:list-item>
        <text:list-item>
          <text:p text:style-name="P2">Fluxo de envio:</text:p>
          <text:list>
            <text:list-item>
              <text:p text:style-name="P2">O aplicativo não deve enviar mensagens automaticamente.</text:p>
            </text:list-item>
            <text:list-item>
              <text:p text:style-name="P2">O usuário apenas deverá clicar no botão "Enviar" dentro do WhatsApp quando a conversa for válida.</text:p>
            </text:list-item>
            <text:list-item>
              <text:p text:style-name="P2">Após um tempo configurável (ex.: 10 segundos), o aplicativo deverá avançar automaticamente para o próximo contato da lista.</text:p>
            </text:list-item>
          </text:list>
        </text:list-item>
        <text:list-item>
          <text:p text:style-name="P2">Relatórios:</text:p>
          <text:list>
            <text:list-item>
              <text:p text:style-name="P2">Exibir quantidade total de contatos.</text:p>
            </text:list-item>
            <text:list-item>
              <text:p text:style-name="P2">Contatos processados.</text:p>
            </text:list-item>
            <text:list-item>
              <text:p text:style-name="P2">Contatos com erro.</text:p>
            </text:list-item>
            <text:list-item>
              <text:p text:style-name="P2">Contatos pendentes.</text:p>
            </text:list-item>
            <text:list-item>
              <text:p text:style-name="P3">Possibilidade de exportar relatório final.</text:p>
            </text:list-item>
          </text:list>
        </text:list-item>
      </text:list>
      <text:h text:style-name="P1" text:outline-level="3">Interface</text:h>
      <text:p text:style-name="Text_20_body">A interface deverá possuir:</text:p>
      <text:list text:style-name="L2">
        <text:list-item>
          <text:p text:style-name="P4">Botão "Selecionar Planilha XLSX"</text:p>
        </text:list-item>
        <text:list-item>
          <text:p text:style-name="P4">Campo para visualizar o arquivo carregado</text:p>
        </text:list-item>
        <text:list-item>
          <text:p text:style-name="P4">Botão "Iniciar Processamento"</text:p>
        </text:list-item>
        <text:list-item>
          <text:p text:style-name="P4">Botão "Pausar"</text:p>
        </text:list-item>
        <text:list-item>
          <text:p text:style-name="P4">Botão "Continuar"</text:p>
        </text:list-item>
        <text:list-item>
          <text:p text:style-name="P4">Botão "Parar"</text:p>
        </text:list-item>
        <text:list-item>
          <text:p text:style-name="P4">Barra de progresso</text:p>
        </text:list-item>
        <text:list-item>
          <text:p text:style-name="P5">Área de log mostrando o andamento da operação</text:p>
        </text:list-item>
      </text:list>
      <text:h text:style-name="P1" text:outline-level="3">Mensagem Utilizada</text:h>
      <text:p text:style-name="Text_20_body">Olá, [Nome]! Tudo bem?</text:p>
      <text:p text:style-name="Text_20_body"><text:soft-page-break/>Muitos salões ainda perdem tempo com agendas espalhadas, controles manuais e informações em vários lugares diferentes.</text:p>
      <text:p text:style-name="Text_20_body">Pensando nisso, estamos oferecendo 15 dias gratuitos para você conhecer uma plataforma que centraliza agenda, clientes, financeiro, comissões e comunicação por WhatsApp em um único sistema.</text:p>
      <text:p text:style-name="Text_20_body">✅ Agenda online<text:line-break/>✅ Cadastro de clientes<text:line-break/>✅ Controle financeiro<text:line-break/>✅ Comissões dos profissionais<text:line-break/>✅ WhatsApp integrado</text:p>
      <text:p text:style-name="Text_20_body">Sem contrato, sem cartão de crédito e sem compromisso.</text:p>
      <text:p text:style-name="Text_20_body">Se desejar conhecer a plataforma, responda apenas "Quero testar" e envio seu acesso ainda hoje.</text:p>
      <text:h text:style-name="P1" text:outline-level="3">Requisitos Técnicos</text:h>
      <text:list text:style-name="L3">
        <text:list-item>
          <text:p text:style-name="P6">Interface moderna e responsiva.</text:p>
        </text:list-item>
        <text:list-item>
          <text:p text:style-name="P6">Compatível com Windows 10 e Windows 11.</text:p>
        </text:list-item>
        <text:list-item>
          <text:p text:style-name="P6">Leitura de arquivos XLSX.</text:p>
        </text:list-item>
        <text:list-item>
          <text:p text:style-name="P6">Tratamento de erros e exceções.</text:p>
        </text:list-item>
        <text:list-item>
          <text:p text:style-name="P6">Código organizado e documentado.</text:p>
        </text:list-item>
        <text:list-item>
          <text:p text:style-name="P6">Possibilidade futura de personalização da mensagem e importação de novos modelos de texto.</text:p>
        </text:list-item>
        <text:list-item>
          <text:p text:style-name="P7">Arquitetura preparada para futuras integrações com APIs de WhatsApp.</text:p>
        </text:list-item>
      </text:list>
      <text:p text:style-name="Text_20_body"/>
      <text:p text:style-name="P8"><text:a xlink:type="simple" xlink:href="http://www.websitelog.com.br/" text:style-name="Internet_20_link" text:visited-style-name="Visited_20_Internet_20_Link">www.websitelog.com.br</text:a></text:p>
      <text:p text:style-name="P8"><text:span text:style-name="T1">whatsapp:</text:span> 34997824990</text:p>
      <text:p text:style-name="P8"><text:span text:style-name="T1">Email:</text:span> <text:s/><text:a xlink:type="simple" xlink:href="mailto:contato@websitelog.com.br" text:style-name="Internet_20_link" text:visited-style-name="Visited_20_Internet_20_Link">contato@websitelog.com.br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7T10:44:35.227005500</meta:creation-date>
    <dc:date>2026-06-07T11:19:25.835841100</dc:date>
    <meta:editing-duration>PT24M38S</meta:editing-duration>
    <meta:editing-cycles>2</meta:editing-cycles>
    <meta:generator>LibreOffice/26.2.3.2$Windows_X86_64 LibreOffice_project/70e089b17412e4cb7773e41413306b17a2328c34</meta:generator>
    <meta:document-statistic meta:table-count="0" meta:image-count="0" meta:object-count="0" meta:page-count="2" meta:paragraph-count="51" meta:word-count="400" meta:character-count="2575" meta:non-whitespace-character-count="2261"/>
  </office:meta>
</office:document-meta>
</file>